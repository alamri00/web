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applet.Applet;<text:line-break/>import java.awt.*;<text:line-break/><text:line-break/>public class Hotel2 extends Applet implements Runnable {<text:line-break/><text:line-break/>String message = "The selected room has already been reserved during this period.";<text:line-break/>int y = 50;<text:line-break/>boolean down = true;<text:line-break/><text:line-break/>public void start() {<text:line-break/>new Thread(this).start();<text:line-break/>}<text:line-break/><text:line-break/>public void run() {<text:line-break/>while (true) {<text:line-break/><text:line-break/>if (down)<text:line-break/>y += 2;<text:line-break/>else<text:line-break/>y -= 2;<text:line-break/><text:line-break/>if (y &gt;= 80)<text:line-break/>down = false;<text:line-break/><text:line-break/>if (y &lt;= 40)<text:line-break/>down = true;<text:line-break/><text:line-break/>repaint();<text:line-break/><text:line-break/>try {<text:line-break/>Thread.sleep(50);<text:line-break/>} catch (Exception e) {<text:line-break/>}<text:line-break/>}<text:line-break/>}<text:line-break/><text:line-break/>public void paint(Graphics g) {<text:line-break/>g.setColor(Color.RED);<text:line-break/>g.setFont(new Font("Arial", Font.BOLD, 18));<text:line-break/>g.drawString(message, 20, y);<text:line-break/>}<text:line-break/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Tahoma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09T04:35:14.811000000</meta:creation-date>
    <dc:date>2026-06-09T04:35:36.732000000</dc:date>
    <meta:editing-duration>PT23S</meta:editing-duration>
    <meta:editing-cycles>1</meta:editing-cycles>
    <meta:document-statistic meta:table-count="0" meta:image-count="0" meta:object-count="0" meta:page-count="1" meta:paragraph-count="1" meta:word-count="97" meta:character-count="598" meta:non-whitespace-character-count="491"/>
    <meta:generator>Neat_Office/6.2.8.2$Windows_x86 LibreOffice_project/</meta:generator>
  </office:meta>
</office:document-meta>
</file>