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1AB52BA36808524BE02.png" manifest:media-type="image/png"/>
  <manifest:file-entry manifest:full-path="Pictures/100002010000025D0000009320BF7215A69B3586.png" manifest:media-type="image/png"/>
  <manifest:file-entry manifest:full-path="Pictures/100002010000026400000098CA7CCE5E9713D465.png" manifest:media-type="image/png"/>
  <manifest:file-entry manifest:full-path="Pictures/1000020100000263000000E22A5D65D1973B4AB3.png" manifest:media-type="image/png"/>
  <manifest:file-entry manifest:full-path="Pictures/100002010000027F000001E0EAAE7345D0662F1B.png" manifest:media-type="image/png"/>
  <manifest:file-entry manifest:full-path="Pictures/100002010000022B000001F6745AE504B8D495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222222" style:font-name="Arial1" fo:letter-spacing="normal" fo:font-style="normal" fo:font-weight="normal"/>
    </style:style>
    <style:style style:name="P2" style:family="paragraph" style:parent-style-name="Standard">
      <style:paragraph-properties fo:orphans="2" fo:widows="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EATE TABLE room (<text:line-break/>RoomNo INT PRIMARY KEY,<text:line-break/>RoomType VARCHAR(50),<text:line-break/>Capacity INT,<text:line-break/>PricePerNight DECIMAL(10,2),<text:line-break/>Status VARCHAR(50)<text:line-break/>);</text:p>
      <text:p text:style-name="P3"/>
      <text:p text:style-name="P3">CREATE TABLE guestdetails (<text:line-break/>GuestID VARCHAR(10) PRIMARY KEY,<text:line-break/>GuestName VARCHAR(100),<text:line-break/>PhoneNumber VARCHAR(20),<text:line-break/>CheckIndate DATE,<text:line-break/>CheckOutdate DATE,<text:line-break/>Guests INT<text:line-break/>);</text:p>
      <text:p text:style-name="P1"/>
      <text:p text:style-name="P3"/>
      <text:p text:style-name="P3">CREATE TABLE booking11 (<text:line-break/>BookingID VARCHAR(10) PRIMARY KEY,<text:line-break/>Guest_ID INT,<text:line-break/>RoomNo INT,<text:line-break/>BookingDate DATE,<text:line-break/>Check_In_Time TIME,<text:line-break/>Check_Out_Time TIME<text:line-break/>);</text:p>
      <text:p text:style-name="P1"/>
      <text:p text:style-name="P3">CREATE TABLE users (<text:line-break/>UserID INT AUTO_INCREMENT PRIMARY KEY,<text:line-break/>Username VARCHAR(50) NOT NULL,<text:line-break/>Password VARCHAR(50) NOT NULL<text:line-break/>);</text:p>
      <text:p text:style-name="P1">INSERT INTO users (Username, Password)<text:line-break/>VALUES<text:line-break/>('admin', '1234'),<text:line-break/>('futun', '123456'),<text:line-break/>('guest', '1111');</text:p>
      <text:p text:style-name="P2"/>
      <text:p text:style-name="P1"><draw:frame draw:style-name="fr1" draw:name="Image1" text:anchor-type="paragraph" svg:width="16.009cm" svg:height="3.889cm" draw:z-index="0"><draw:image xlink:href="Pictures/100002010000025D0000009320BF7215A69B3586.png" xlink:type="simple" xlink:show="embed" xlink:actuate="onLoad" loext:mime-type="image/png"/></draw:frame><draw:frame draw:style-name="fr2" draw:name="Image2" text:anchor-type="paragraph" svg:x="0.404cm" svg:y="4.02cm" svg:width="16.194cm" svg:height="4.022cm" draw:z-index="1"><draw:image xlink:href="Pictures/100002010000026400000098CA7CCE5E9713D465.png" xlink:type="simple" xlink:show="embed" xlink:actuate="onLoad" loext:mime-type="image/png"/></draw:frame></text:p>
      <text:p text:style-name="Standard"><draw:frame draw:style-name="fr1" draw:name="Image3" text:anchor-type="paragraph" svg:width="16.168cm" svg:height="5.98cm" draw:z-index="2"><draw:image xlink:href="Pictures/1000020100000263000000E22A5D65D1973B4AB3.png" xlink:type="simple" xlink:show="embed" xlink:actuate="onLoad" loext:mime-type="image/png"/></draw:frame><text:soft-page-break/></text:p>
      <text:p text:style-name="Standard"><draw:frame draw:style-name="fr1" draw:name="Image4" text:anchor-type="paragraph" svg:width="12.278cm" svg:height="11.299cm" draw:z-index="3"><draw:image xlink:href="Pictures/10000201000001D0000001AB52BA36808524BE0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5" text:anchor-type="paragraph" svg:x="0.596cm" svg:y="0.062cm" svg:width="14.4cm" svg:height="10.818cm" draw:z-index="4"><draw:image xlink:href="Pictures/100002010000027F000001E0EAAE7345D0662F1B.png" xlink:type="simple" xlink:show="embed" xlink:actuate="onLoad" loext:mime-type="image/png"/></draw:frame></text:p>
      <text:p text:style-name="Standard"/>
      <text:p text:style-name="Standard"><draw:frame draw:style-name="fr2" draw:name="Image6" text:anchor-type="paragraph" svg:x="1.157cm" svg:y="11.994cm" svg:width="14.686cm" svg:height="13.284cm" draw:z-index="5"><draw:image xlink:href="Pictures/100002010000022B000001F6745AE504B8D495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Tahoma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09T00:02:50.066000000</meta:creation-date>
    <dc:date>2026-06-09T00:19:35.219000000</dc:date>
    <meta:editing-duration>PT6M24S</meta:editing-duration>
    <meta:editing-cycles>2</meta:editing-cycles>
    <meta:generator>Neat_Office/6.2.8.2$Windows_x86 LibreOffice_project/</meta:generator>
    <meta:document-statistic meta:table-count="0" meta:image-count="6" meta:object-count="0" meta:page-count="3" meta:paragraph-count="5" meta:word-count="85" meta:character-count="663" meta:non-whitespace-character-count="583"/>
  </office:meta>
</office:document-meta>
</file>